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3.png"/>
  <manifest:file-entry manifest:media-type="image/png" manifest:full-path="Pictures/image1.png"/>
  <manifest:file-entry manifest:media-type="image/png" manifest:full-path="Pictures/image2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 presentation:duration="PT0S" presentation:transition-type="manual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 presentation:duration="PT0S" presentation:transition-type="manual"/>
    </style:style>
    <text:list-style style:name="L1">
      <text:list-level-style-bullet text:bullet-char="•" text:level="1">
        <style:list-level-properties text:list-level-position-and-space-mode="label-alignment">
          <style:list-level-label-alignment text:label-followed-by="listtab" text:list-tab-stop-position="36.00000000000pt" fo:text-indent="-18.00000000000pt" fo:margin-left="36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6.24580000000pt" presentation:class="title">
          <draw:text-box>
            <text:p text:style-name="P8">Проект по flask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48.21740636580pt" svg:x="39.68510000000pt" svg:y="164.41000000000pt" presentation:class="subtitle">
          <draw:text-box>
            <text:p text:style-name="P9">Дьяченко Аларик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0" draw:id="shape-20" draw:layer="layout" svg:width="698.45790291200pt" svg:height="83.33872705200pt" svg:x="48.28891438847pt" svg:y="48.28428393955pt" presentation:class="title">
          <draw:text-box>
            <text:p text:style-name="P11">Идея проекта</text:p>
          </draw:text-box>
          <draw:glue-point draw:id="4" svg:x="0.50000000000pt" svg:y="0.50000000000pt" draw:align="center"/>
        </draw:frame>
        <draw:frame draw:style-name="gr5" xml:id="shape-21" draw:id="shape-21" draw:layer="layout" svg:width="698.45790291200pt" svg:height="380.97703795200pt" svg:x="47.62212974400pt" svg:y="142.86638923200pt" presentation:class="outline">
          <draw:text-box>
            <text:p text:style-name="P12">Создать open-source версию reddit</text:p>
          </draw:text-box>
          <draw:glue-point draw:id="4" svg:x="0.50000000000pt" svg:y="0.50000000000pt" draw:align="center"/>
        </draw:frame>
        <presentation:notes>
          <draw:frame presentation:style-name="pr1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3" draw:id="shape-23" draw:layer="" svg:width="420.88891811840pt" svg:height="315.66668858880pt" svg:x="87.16550000000pt" svg:y="63.97810000000pt" presentation:class="page" draw:page-number="2"/>
          <draw:frame draw:style-name="gr7" xml:id="shape-24" draw:id="shape-24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3" draw:id="page3" xml:id="page3" draw:master-page-name="Default1" draw:style-name="dp4" presentation:presentation-page-layout-name="pl3">
        <draw:layer-set>
          <draw:layer draw:name=""/>
        </draw:layer-set>
        <draw:frame draw:style-name="gr5" xml:id="shape-25" draw:id="shape-25" draw:layer="" svg:width="698.45790291200pt" svg:height="83.33872705200pt" svg:x="47.62212974400pt" svg:y="47.62212974400pt" presentation:class="title">
          <draw:text-box>
            <text:p text:style-name="P11">Структура</text:p>
          </draw:text-box>
          <draw:glue-point draw:id="4" svg:x="0.50000000000pt" svg:y="0.50000000000pt" draw:align="center"/>
        </draw:frame>
        <draw:frame draw:style-name="gr5" xml:id="shape-26" draw:id="shape-26" draw:layer="" svg:width="698.45790291200pt" svg:height="380.97703795200pt" svg:x="47.62212974400pt" svg:y="142.86638923200pt" presentation:class="subtitle">
          <draw:text-box>
            <text:list text:style-name="L1" xml:id="list-7b43c6a5-db6d-4f50-ac95-c6a1213ceca9">
              <text:list-item>
                <text:p text:style-name="P12">В файле main.py содержится код для страниц</text:p>
              </text:list-item>
              <text:list-item>
                <text:p text:style-name="P12">В файле send_email.py содержится код для отправки электронных писем</text:p>
              </text:list-item>
              <text:list-item>
                <text:p text:style-name="P12">В папке data содержатся модели пользователей, постов, комментариев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7" draw:id="shape-2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8" draw:id="shape-28" draw:layer="" svg:width="396.28000000000pt" svg:height="296.96000000000pt" svg:x="108.00000000000pt" svg:y="60.18000000000pt" presentation:class="page" draw:page-number="3"/>
        </presentation:notes>
      </draw:page>
      <draw:page draw:name="page4" draw:id="page4" xml:id="page4" draw:master-page-name="Default1" draw:style-name="dp4" presentation:presentation-page-layout-name="pl2">
        <draw:layer-set>
          <draw:layer draw:name=""/>
        </draw:layer-set>
        <draw:frame draw:style-name="gr5" xml:id="shape-29" draw:id="shape-29" draw:layer="" svg:width="698.45790291200pt" svg:height="83.33872705200pt" svg:x="47.62212974400pt" svg:y="47.62212974400pt" presentation:class="title">
          <draw:text-box>
            <text:p text:style-name="P11">Используемые технологии</text:p>
          </draw:text-box>
          <draw:glue-point draw:id="4" svg:x="0.50000000000pt" svg:y="0.50000000000pt" draw:align="center"/>
        </draw:frame>
        <draw:frame draw:style-name="gr5" xml:id="shape-30" draw:id="shape-30" draw:layer="" svg:width="698.45790291200pt" svg:height="380.97703795200pt" svg:x="47.62212974400pt" svg:y="142.86638923200pt" presentation:class="outline">
          <draw:text-box>
            <text:list text:style-name="L1" xml:id="list-074f644c-32e3-43a9-93e1-b12e86e885cb">
              <text:list-item>
                <text:p text:style-name="P12">SMTPlib и собственный почтовый сервер для отправки электронных писем</text:p>
              </text:list-item>
              <text:list-item>
                <text:p text:style-name="P12">reCAPTCHA для защиты от ботов</text:p>
              </text:list-item>
              <text:list-item>
                <text:p text:style-name="P12">Дфухфакторная аутентификация предотвращает кражу аккаунтов и регистрацию большого количества аккаунтов</text:p>
              </text:list-item>
              <text:list-item>
                <text:p text:style-name="P12">Хостинг на собственном домене с использованием nginx и gunicorn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31" draw:id="shape-3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2">
        <draw:layer-set>
          <draw:layer draw:name=""/>
        </draw:layer-set>
        <draw:frame draw:style-name="gr5" xml:id="shape-33" draw:id="shape-33" draw:layer="" svg:width="698.45790291200pt" svg:height="83.33872705200pt" svg:x="47.62212974400pt" svg:y="47.62212974400pt" presentation:class="title">
          <draw:text-box>
            <text:p text:style-name="P11">Заключение</text:p>
          </draw:text-box>
          <draw:glue-point draw:id="4" svg:x="0.50000000000pt" svg:y="0.50000000000pt" draw:align="center"/>
        </draw:frame>
        <draw:frame draw:style-name="gr5" xml:id="shape-34" draw:id="shape-34" draw:layer="" svg:width="698.45790291200pt" svg:height="380.97703795200pt" svg:x="47.62212974400pt" svg:y="142.86638923200pt" presentation:class="outline">
          <draw:text-box>
            <text:p text:style-name="P12">Этот проект можно доработать и развить, добавив такие функции, как:<text:s/></text:p>
            <text:list text:style-name="L1" xml:id="list-52c9f371-188f-459b-956a-171c8360c9ae">
              <text:list-item>
                <text:p text:style-name="P12">использование javascript для плавного интерфейса</text:p>
              </text:list-item>
              <text:list-item>
                <text:p text:style-name="P12">рекомендательные технологии</text:p>
              </text:list-item>
              <text:list-item>
                <text:p text:style-name="P12">личные сообщения</text:p>
              </text:list-item>
              <text:list-item>
                <text:p text:style-name="P12">поисковый движок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35" draw:id="shape-3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6" draw:id="shape-36" draw:layer="" svg:width="396.28000000000pt" svg:height="296.96000000000pt" svg:x="108.00000000000pt" svg:y="60.18000000000pt" presentation:class="page" draw:page-number="5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Contents_206" style:display-name="Contents 6" style:family="paragraph">
      <style:paragraph-properties fo:margin-left="40.000000000000000pt"/>
    </style:style>
    <style:style style:name="Bibliography_20custom1" style:display-name="Bibliography custom1" style:family="paragraph"/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Bibliography_20custom2" style:display-name="Bibliography custom2" style:family="paragraph"/>
    <style:style style:name="Bibliography_20conference" style:display-name="Bibliography conference" style:family="paragraph"/>
    <style:style style:name="Bibliography_20custom4" style:display-name="Bibliography custom4" style:family="paragraph"/>
    <style:style style:name="Bibliography_20article" style:display-name="Bibliography article" style:family="paragraph"/>
    <style:style style:name="Contents_208" style:display-name="Contents 8" style:family="paragraph">
      <style:paragraph-properties fo:margin-left="56.000000000000000pt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Bibliography_20phdthesis" style:display-name="Bibliography phdthesis" style:family="paragraph"/>
    <style:style style:name="Bibliography_20inproceedings" style:display-name="Bibliography inproceedings" style:family="paragraph"/>
    <style:style style:name="Bibliography_20booklet" style:display-name="Bibliography booklet" style:family="paragraph"/>
    <style:style style:name="Contents_205" style:display-name="Contents 5" style:family="paragraph">
      <style:paragraph-properties fo:margin-left="32.000000000000000pt"/>
    </style:style>
    <style:style style:name="Bibliography_20custom5" style:display-name="Bibliography custom5" style:family="paragraph"/>
    <style:style style:name="Contents_2010" style:display-name="Contents 10" style:family="paragraph">
      <style:paragraph-properties fo:margin-left="72.000000000000000pt"/>
    </style:style>
    <style:style style:name="Bibliography_20inbook" style:display-name="Bibliography inbook" style:family="paragraph"/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Footnote" style:display-name="Footnote" style:family="paragraph" style:next-style-name=""/>
    <style:style style:name="Contents_203" style:display-name="Contents 3" style:family="paragraph">
      <style:paragraph-properties fo:margin-left="16.000000000000000pt"/>
    </style:style>
    <style:style style:name="Contents_207" style:display-name="Contents 7" style:family="paragraph">
      <style:paragraph-properties fo:margin-left="48.000000000000000pt"/>
    </style:style>
    <style:style style:name="Bibliography_20book" style:display-name="Bibliography book" style:family="paragraph"/>
    <style:style style:name="Endnote" style:display-name="Endnote" style:family="paragraph" style:next-style-name=""/>
    <style:style style:name="Bibliography_20techreport" style:display-name="Bibliography techreport" style:family="paragraph"/>
    <style:style style:name="Bibliography_20custom3" style:display-name="Bibliography custom3" style:family="paragraph"/>
    <style:style style:name="Bibliography_20proceedings" style:display-name="Bibliography proceedings" style:family="paragraph"/>
    <style:style style:name="Bibliography_20incollection" style:display-name="Bibliography incollection" style:family="paragraph"/>
    <style:style style:name="Bibliography_20journal" style:display-name="Bibliography journal" style:family="paragraph"/>
    <style:style style:name="Contents_204" style:display-name="Contents 4" style:family="paragraph">
      <style:paragraph-properties fo:margin-left="24.000000000000000pt"/>
    </style:style>
    <style:style style:name="Contents_209" style:display-name="Contents 9" style:family="paragraph">
      <style:paragraph-properties fo:margin-left="64.000000000000000pt"/>
    </style:style>
    <style:style style:name="Bibliography_20email" style:display-name="Bibliography email" style:family="paragraph"/>
    <style:style style:name="Contents_202" style:display-name="Contents 2" style:family="paragraph">
      <style:paragraph-properties fo:margin-left="8.000000000000000pt"/>
    </style:style>
    <style:style style:name="Bibliography_20manual" style:display-name="Bibliography manual" style:family="paragraph"/>
    <style:style style:name="Bibliography_20misc" style:display-name="Bibliography misc" style:family="paragraph"/>
    <style:style style:name="Bibliography_20mastersthesis" style:display-name="Bibliography mastersthesis" style:family="paragraph"/>
    <style:style style:name="Bibliography_20www" style:display-name="Bibliography www" style:family="paragraph"/>
    <style:style style:name="Bibliography_20unpublished" style:display-name="Bibliography unpublished" style:family="paragraph"/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auto-grow-height="false" draw:auto-grow-width="false"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auto-grow-height="false" draw:auto-grow-width="false" draw:blue="0%" draw:color-mode="standard" draw:contrast="0%" draw:fill="none" draw:gamma="0%" draw:green="0%" draw:luminance="0%" draw:red="0%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12.3</meta:generator>
    <dc:title>Curious penguin</dc:title>
    <meta:initial-creator>Unknown</meta:initial-creator>
    <meta:editing-cycles>2</meta:editing-cycles>
    <dc:date>2026-05-19T17:57:26</dc:date>
    <meta:creation-date>2010-09-14T19:07:31</meta:creation-date>
  </office:meta>
</office:document-meta>
</file>